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600000726BE8F8089.png" manifest:media-type="image/png"/>
  <manifest:file-entry manifest:full-path="Pictures/100000010000099B000002D0E3AD8DEE.png" manifest:media-type="image/png"/>
  <manifest:file-entry manifest:full-path="Pictures/10000001000002530000034969E31891.png" manifest:media-type="image/png"/>
  <manifest:file-entry manifest:full-path="Pictures/10002B00000051F2000073E0476F31E5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Kumbh Sans" svg:font-family="'Kumbh Sans'" style:font-family-generic="roman" style:font-pitch="variable"/>
    <style:font-face style:name="Kumbh Sans ExtraBold" svg:font-family="'Kumbh Sans ExtraBold'" style:font-family-generic="roman" style:font-pitch="variable"/>
    <style:font-face style:name="Kumbh Sans ExtraBold1" svg:font-family="'Kumbh Sans ExtraBold'" style:font-family-generic="system" style:font-pitch="variable"/>
    <style:font-face style:name="Kumbh Sans Light" svg:font-family="'Kumbh Sans Light'" style:font-family-generic="roman" style:font-pitch="variable"/>
    <style:font-face style:name="Kumbh Sans1" svg:font-family="'Kumbh Sans'" style:font-family-generic="system" style:font-pitch="variable"/>
    <style:font-face style:name="Liberation Sans" svg:font-family="'Liberation Sans'" style:font-family-generic="swiss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Symbol" svg:font-family="Symbol" style:font-family-generic="system" style:font-pitch="variable"/>
    <style:font-face style:name="Times New Roman (Textkörper CS)" svg:font-family="'Times New Roman (Textkörper CS)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itle">
      <style:paragraph-properties fo:margin-top="1.023cm" fo:margin-bottom="0.106cm" style:contextual-spacing="false" fo:text-align="left" style:justify-single-word="false" fo:orphans="2" fo:widows="2" style:vertical-align="middle" style:writing-mode="lr-tb"/>
    </style:style>
    <style:style style:name="P2" style:family="paragraph">
      <loext:graphic-properties draw:fill="none"/>
      <style:paragraph-properties fo:text-align="left"/>
      <style:text-properties fo:font-size="18pt"/>
    </style:style>
    <style:style style:name="P3" style:family="paragraph" style:parent-style-name="Heading_20_1">
      <style:text-properties officeooo:rsid="00036577" officeooo:paragraph-rsid="000865cb"/>
    </style:style>
    <style:style style:name="P4" style:family="paragraph" style:parent-style-name="Standard">
      <style:text-properties officeooo:rsid="00036577" officeooo:paragraph-rsid="00036577"/>
    </style:style>
    <style:style style:name="P5" style:family="paragraph" style:parent-style-name="Heading_20_2">
      <style:text-properties officeooo:rsid="00036577" officeooo:paragraph-rsid="00036577"/>
    </style:style>
    <style:style style:name="P6" style:family="paragraph" style:parent-style-name="Standard">
      <style:text-properties officeooo:rsid="000865cb" officeooo:paragraph-rsid="000865cb"/>
    </style:style>
    <style:style style:name="P7" style:family="paragraph" style:parent-style-name="Standard">
      <style:text-properties fo:language="de" fo:country="DE" officeooo:rsid="00038d09"/>
    </style:style>
    <style:style style:name="P8" style:family="paragraph" style:parent-style-name="Standard">
      <style:text-properties fo:language="de" fo:country="DE" officeooo:rsid="00043c08" officeooo:paragraph-rsid="00043c08"/>
    </style:style>
    <style:style style:name="P9" style:family="paragraph" style:parent-style-name="Standard">
      <style:text-properties officeooo:paragraph-rsid="00043c08"/>
    </style:style>
    <style:style style:name="P10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1" style:family="paragraph" style:parent-style-name="Header">
      <style:paragraph-properties fo:margin-top="0.141cm" fo:margin-bottom="0.141cm" style:contextual-spacing="false"/>
    </style:style>
    <style:style style:name="P12" style:family="paragraph" style:parent-style-name="Rahmeninhalt">
      <style:paragraph-properties fo:margin-top="0.141cm" fo:margin-bottom="0.141cm" style:contextual-spacing="false"/>
    </style:style>
    <style:style style:name="P13" style:family="paragraph">
      <loext:graphic-properties draw:fill="none"/>
      <style:paragraph-properties fo:text-align="left"/>
      <style:text-properties fo:color="#000000" loext:opacity="100%" fo:font-size="18pt"/>
    </style:style>
    <style:style style:name="T1" style:family="text">
      <style:text-properties officeooo:rsid="00036577"/>
    </style:style>
    <style:style style:name="T2" style:family="text">
      <style:text-properties officeooo:rsid="000865cb"/>
    </style:style>
    <style:style style:name="T3" style:family="text">
      <style:text-properties officeooo:rsid="000eee6b"/>
    </style:style>
    <style:style style:name="T4" style:family="text">
      <style:text-properties officeooo:rsid="00038d09"/>
    </style:style>
    <style:style style:name="T5" style:family="text">
      <style:text-properties fo:language="de" fo:country="DE" officeooo:rsid="000865cb"/>
    </style:style>
    <style:style style:name="T6" style:family="text">
      <style:text-properties officeooo:rsid="000da1de"/>
    </style:style>
    <style:style style:name="T7" style:family="text">
      <style:text-properties style:font-name="Kumbh Sans Light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righ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loext:vertical-rel="page-content-top" style:horizontal-pos="from-left" style:horizontal-rel="page-start-margin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dash" draw:stroke-dash="Dot_20__28_Rounded_29_" svg:stroke-width="0.044cm" svg:stroke-color="#9d2632" draw:stroke-linejoin="round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style style:name="gr2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bottom" draw:auto-grow-height="false" fo:min-height="1.988cm" fo:min-width="10.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chnung</text:span><draw:line text:anchor-type="as-char" draw:z-index="5" draw:name="Gerade Verbindung 1" draw:style-name="gr1" draw:text-style-name="P2" svg:x2="16.999cm" svg:y2="0.002cm"><text:p/></draw:line></text:p>
      <text:h text:style-name="P3" text:outline-level="1"><text:span text:style-name="T2">${org.name}</text:span><text:line-break/><text:span text:style-name="T2">${org.address_street}</text:span><text:line-break/><text:span text:style-name="T2">${org.address_postal_code}</text:span> <text:span text:style-name="T2">${org.address_city}</text:span><text:line-break/><text:line-break/><text:span text:style-name="T2">${contact.fullname}</text:span><text:line-break/><text:line-break/> </text:h>
      <text:p text:style-name="P4"/>
      <text:h text:style-name="P5" text:outline-level="2">Rechnung Nr.: <text:span text:style-name="T3">${billing_number}</text:span></text:h>
      <text:p text:style-name="P4"/>
      <text:p text:style-name="Standard">Sehr geehrte<text:span text:style-name="T2">(</text:span>r<text:span text:style-name="T2">)</text:span> <text:span text:style-name="T2">${contact.fullname}</text:span><text:span text:style-name="T4">,</text:span></text:p>
      <text:p text:style-name="P6">für den Mitgliedsbeitrag ${billing_period.title} von ${member.fullname} stellen wir Ihnen folgenden Betrag in Rechnung:</text:p>
      <text:p text:style-name="Standard"/>
      <text:p text:style-name="P6">Mitgliedsbeitrag ${billing_period.title} <text:tab/><text:tab/><text:tab/><text:tab/><text:tab/><text:tab/><text:tab/>${event_member.costs} €</text:p>
      <text:p text:style-name="P4"/>
      <text:p text:style-name="P4"><text:tab/><text:tab/><text:tab/><text:tab/><text:tab/><text:tab/><text:tab/><text:tab/><text:tab/></text:p>
      <text:p text:style-name="Standard">Wir Bitten um eine Überweisung auf das Konto <text:s/><text:span text:style-name="T5">${org.iban}</text:span></text:p>
      <text:p text:style-name="P7"><draw:frame draw:style-name="fr1" draw:name="Bild2" text:anchor-type="char" svg:x="8.751cm" svg:y="-0.044cm" svg:width="8.174cm" svg:height="8.174cm" draw:z-index="9"><draw:image xlink:href="Pictures/100000010000072600000726BE8F8089.png" xlink:type="simple" xlink:show="embed" xlink:actuate="onLoad" draw:mime-type="image/png"/></draw:frame></text:p>
      <text:p text:style-name="P8">Im Namen der <text:span text:style-name="T2">${org.name}</text:span></text:p>
      <text:p text:style-name="P8"><text:span text:style-name="T6">Der </text:span>Kassier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Kumbh Sans" svg:font-family="'Kumbh Sans'" style:font-family-generic="roman" style:font-pitch="variable"/>
    <style:font-face style:name="Kumbh Sans ExtraBold" svg:font-family="'Kumbh Sans ExtraBold'" style:font-family-generic="roman" style:font-pitch="variable"/>
    <style:font-face style:name="Kumbh Sans ExtraBold1" svg:font-family="'Kumbh Sans ExtraBold'" style:font-family-generic="system" style:font-pitch="variable"/>
    <style:font-face style:name="Kumbh Sans Light" svg:font-family="'Kumbh Sans Light'" style:font-family-generic="roman" style:font-pitch="variable"/>
    <style:font-face style:name="Kumbh Sans1" svg:font-family="'Kumbh Sans'" style:font-family-generic="system" style:font-pitch="variable"/>
    <style:font-face style:name="Liberation Sans" svg:font-family="'Liberation Sans'" style:font-family-generic="swiss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Symbol" svg:font-family="Symbol" style:font-family-generic="system" style:font-pitch="variable"/>
    <style:font-face style:name="Times New Roman (Textkörper CS)" svg:font-family="'Times New Roman (Textkörper CS)'" style:font-family-generic="system" style:font-pitch="variable"/>
    <style:font-face style:name="Wingdings" svg:font-family="Wingdings" style:font-family-generic="system" style:font-pitch="variabl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de" fo:country="AT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2pt" fo:language="de" fo:country="AT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141cm" style:contextual-spacing="false" fo:line-height="120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fo:color="#4d4f59" loext:opacity="100%" style:font-name="Kumbh Sans Light" fo:font-family="'Kumbh Sans Light'" style:font-family-generic="roman" style:font-pitch="variable" fo:font-size="9pt" fo:language="de" fo:country="DE" style:letter-kerning="true" style:font-name-asian="Calibri1" style:font-family-asian="Calibri" style:font-family-generic-asian="system" style:font-pitch-asian="variable" style:font-size-asian="9pt" style:language-asian="en" style:country-asian="US" style:font-name-complex="Times New Roman (Textkörper CS)" style:font-family-complex="'Times New Roman (Textkörper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>
        <loext:char-complex-color loext:theme-type="dark2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Roboto1" style:font-family-complex="Roboto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chapter">
      <style:paragraph-properties fo:margin-top="0.459cm" fo:margin-bottom="0.176cm" style:contextual-spacing="false" fo:line-height="100%" fo:keep-with-next="always" style:vertical-align="middle"/>
      <style:text-properties fo:color="#8c0026" loext:opacity="100%" style:font-name="Kumbh Sans" fo:font-family="'Kumbh Sans'" style:font-family-generic="roman" style:font-pitch="variable" fo:font-size="13pt" fo:letter-spacing="0.005cm" fo:font-weight="bold" style:letter-kerning="false" style:font-size-asian="13pt" style:font-weight-asian="bold" style:font-name-complex="Kumbh Sans1" style:font-family-complex="'Kumbh Sans'" style:font-family-generic-complex="system" style:font-pitch-complex="variable" style:font-size-complex="13pt" style:font-weight-complex="bold">
        <loext:char-complex-color loext:theme-type="dark2" loext:color-type="theme"/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chapter">
      <style:paragraph-properties fo:margin-top="0.388cm" fo:margin-bottom="0.141cm" style:contextual-spacing="false" fo:line-height="100%" fo:keep-with-next="always" style:vertical-align="middle">
        <style:tab-stops>
          <style:tab-stop style:position="0.635cm"/>
          <style:tab-stop style:position="0.953cm"/>
        </style:tab-stops>
      </style:paragraph-properties>
      <style:text-properties fo:color="#000026" loext:opacity="100%" style:font-name="Kumbh Sans" fo:font-family="'Kumbh Sans'" style:font-family-generic="roman" style:font-pitch="variable" fo:font-size="11pt" fo:letter-spacing="0.004cm" fo:font-weight="bold" style:letter-kerning="false" style:font-size-asian="11pt" style:font-weight-asian="bold" style:font-name-complex="Kumbh Sans1" style:font-family-complex="'Kumbh Sans'" style:font-family-generic-complex="system" style:font-pitch-complex="variable" style:font-size-complex="11pt" style:font-weight-complex="bold">
        <loext:char-complex-color loext:theme-type="dark2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>
      <style:paragraph-properties fo:margin-top="0.071cm" fo:margin-bottom="0.141cm" style:contextual-spacing="false" fo:keep-together="always" fo:keep-with-next="always"/>
      <style:text-properties fo:color="#4e131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Verzeichnis" style:family="paragraph" style:parent-style-name="Standard">
      <style:paragraph-properties text:number-lines="false" text:line-number="0"/>
      <style:text-properties style:font-name-complex="Roboto1" style:font-family-complex="Roboto" style:font-family-generic-complex="system" style:font-pitch-complex="variable"/>
    </style:style>
    <style:style style:name="Kopf-_20_und_20_Fußzeile" style:display-name="Kopf- und Fußzeil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loext:linked-style-name="Fußzeile_20_Zchn" style:class="extra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4d4f59" loext:opacity="100%" style:font-name="Kumbh Sans" fo:font-family="'Kumbh Sans'" style:font-family-generic="roman" style:font-pitch="variable" fo:font-size="9pt" fo:language="de" fo:country="AT" style:letter-kerning="true" style:font-name-asian="Calibri1" style:font-family-asian="Calibri" style:font-family-generic-asian="system" style:font-pitch-asian="variable" style:font-size-asian="9pt" style:language-asian="en" style:country-asian="US" style:font-name-complex="Times New Roman (Textkörper CS)" style:font-family-complex="'Times New Roman (Textkörper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/>
      </style:text-properties>
    </style:style>
    <style:style style:name="_5b_Einf._20_Abs._5d_" style:display-name="[Einf. Abs.]" style:family="paragraph" style:parent-style-name="Standard">
      <style:paragraph-properties style:vertical-align="middle"/>
      <style:text-properties fo:color="#000000" loext:opacity="100%" style:font-name="Minion Pro" fo:font-family="'Minion Pro'" style:font-family-generic="roman" style:font-pitch="variable" style:letter-kerning="false" style:font-name-complex="Minion Pro1" style:font-family-complex="'Minion Pro'" style:font-family-generic-complex="system" style:font-pitch-complex="variable">
        <loext:char-complex-color loext:theme-type="dark2" loext:color-type="theme"/>
      </style:text-properties>
    </style:style>
    <style:style style:name="Title" style:family="paragraph" style:next-style-name="Standard" loext:linked-style-name="Titel_20_Zchn" style:class="chapter">
      <style:paragraph-properties fo:margin-top="1.023cm" fo:margin-bottom="0.106cm" style:contextual-spacing="false" fo:text-align="left" style:justify-single-word="false" fo:orphans="2" fo:widows="2" fo:hyphenation-ladder-count="no-limit" fo:hyphenation-keep="auto" loext:hyphenation-keep-type="column" loext:hyphenation-keep-line="false" style:vertical-align="middle" style:writing-mode="lr-tb">
        <style:tab-stops>
          <style:tab-stop style:position="0.25cm"/>
        </style:tab-stops>
      </style:paragraph-properties>
      <style:text-properties fo:text-transform="uppercase" fo:color="#9d2632" loext:opacity="100%" style:font-name="Kumbh Sans ExtraBold" fo:font-family="'Kumbh Sans ExtraBold'" style:font-family-generic="roman" style:font-pitch="variable" fo:font-size="14pt" fo:letter-spacing="0.005cm" fo:language="de" fo:country="DE" fo:font-weight="bold" style:letter-kerning="false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Kumbh Sans ExtraBold1" style:font-family-complex="'Kumbh Sans ExtraBold'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/>
      </style:text-properties>
    </style:style>
    <style:style style:name="Subtitle" style:family="paragraph" style:next-style-name="Standard" loext:linked-style-name="Untertitel_20_Zchn" style:class="chapter">
      <style:paragraph-properties fo:margin-top="0cm" fo:margin-bottom="0cm" style:contextual-spacing="false" fo:line-height="90%" fo:text-align="left" style:justify-single-word="false" fo:orphans="2" fo:widows="2" fo:hyphenation-ladder-count="no-limit" fo:hyphenation-keep="auto" loext:hyphenation-keep-type="column" loext:hyphenation-keep-line="false" style:vertical-align="middle" style:writing-mode="lr-tb">
        <style:tab-stops>
          <style:tab-stop style:position="0.25cm"/>
        </style:tab-stops>
      </style:paragraph-properties>
      <style:text-properties fo:color="#4d4f59" loext:opacity="100%" style:font-name="Kumbh Sans" fo:font-family="'Kumbh Sans'" style:font-family-generic="roman" style:font-pitch="variable" fo:font-size="14pt" fo:letter-spacing="0.005cm" fo:language="de" fo:country="DE" fo:font-weight="bold" style:letter-kerning="false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Kumbh Sans1" style:font-family-complex="'Kumbh Sans'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/>
      </style:text-properties>
    </style:style>
    <style:style style:name="Quote" style:family="paragraph" style:parent-style-name="Standard" style:next-style-name="Standard" loext:linked-style-name="Zitat_20_Zchn">
      <style:paragraph-properties fo:margin-left="1.524cm" fo:margin-right="1.524cm" fo:margin-top="0.353cm" fo:margin-bottom="0.282cm" style:contextual-spacing="false" fo:text-align="center" style:justify-single-word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9d2632" fo:border-bottom="0.51pt solid #9d2632"/>
      <style:text-properties fo:color="#9d2632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 style:list-style-name="WWNum1" style:list-level="1">
      <style:paragraph-properties fo:margin-left="1.251cm" fo:margin-top="0.141cm" fo:margin-bottom="0.141cm" style:contextual-spacing="true" fo:text-indent="-0.75cm" style:auto-text-indent="false"/>
      <style:text-properties style:font-size-complex="9pt"/>
    </style:style>
    <style:style style:name="No_20_Spacing" style:display-name="No Spacing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Kumbh Sans" fo:font-family="'Kumbh Sans'" style:font-family-generic="roman" style:font-pitch="variable" fo:font-size="10pt" fo:language="de" fo:country="AT" style:letter-kerning="true" style:font-name-asian="Calibri1" style:font-family-asian="Calibri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1" style:display-name="List 1" style:family="paragraph" style:parent-style-name="List_20_Paragraph" style:list-style-name="WWNum2" style:list-level="1" style:class="list"/>
    <style:style style:name="Fußzeile_20_2_20_-_20_PPÖ_20__2b__20_Kontakt" style:display-name="Fußzeile 2 - PPÖ + Kontakt" style:family="paragraph" style:parent-style-name="Footer">
      <style:paragraph-properties style:vertical-align="middle"/>
      <style:text-properties fo:font-size="8pt" fo:letter-spacing="0.004cm" fo:language="de" fo:country="DE" style:letter-kerning="false" style:font-size-asian="8pt" style:font-name-complex="Kumbh Sans1" style:font-family-complex="'Kumbh Sans'" style:font-family-generic-complex="system" style:font-pitch-complex="variable" style:font-size-complex="8pt"/>
    </style:style>
    <style:style style:name="Rahmeninhalt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>
      <style:text-properties fo:color="#4d4f59" loext:opacity="100%" style:font-name="Kumbh Sans" fo:font-family="'Kumbh Sans'" style:font-family-generic="roman" style:font-pitch="variable" fo:font-size="9pt" style:font-size-asian="9pt" style:font-name-complex="Times New Roman (Textkörper CS)" style:font-family-complex="'Times New Roman (Textkörper CS)'" style:font-family-generic-complex="system" style:font-pitch-complex="variable">
        <loext:char-complex-color loext:theme-type="dark2" loext:color-type="theme"/>
      </style:text-properties>
    </style:style>
    <style:style style:name="Internet_20_Link" style:display-name="Internet Link" style:family="text" style:parent-style-name="Default_20_Paragraph_20_Font">
      <style:text-properties fo:color="#9d2632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age_20_Number" style:display-name="Page Number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8c0026" loext:opacity="100%" style:font-name="Kumbh Sans" fo:font-family="'Kumbh Sans'" style:font-family-generic="roman" style:font-pitch="variable" fo:font-size="13pt" fo:letter-spacing="0.005cm" fo:language="de" fo:country="DE" fo:font-weight="bold" style:letter-kerning="false" style:font-size-asian="13pt" style:font-weight-asian="bold" style:font-name-complex="Kumbh Sans1" style:font-family-complex="'Kumbh Sans'" style:font-family-generic-complex="system" style:font-pitch-complex="variable" style:font-size-complex="13pt" style:font-weight-complex="bold"/>
    </style:style>
    <style:style style:name="Überschrift_20_2_20_Zchn" style:display-name="Überschrift 2 Zchn" style:family="text" style:parent-style-name="Default_20_Paragraph_20_Font">
      <style:text-properties fo:color="#000026" loext:opacity="100%" style:font-name="Kumbh Sans" fo:font-family="'Kumbh Sans'" style:font-family-generic="roman" style:font-pitch="variable" fo:font-size="11pt" fo:letter-spacing="0.004cm" fo:language="de" fo:country="DE" fo:font-weight="bold" style:letter-kerning="false" style:font-size-asian="11pt" style:font-weight-asian="bold" style:font-name-complex="Kumbh Sans1" style:font-family-complex="'Kumbh Sans'" style:font-family-generic-complex="system" style:font-pitch-complex="variable" style:font-size-complex="11pt" style:font-weight-complex="bold"/>
    </style:style>
    <style:style style:name="Titel_20_Zchn" style:display-name="Titel Zchn" style:family="text" style:parent-style-name="Default_20_Paragraph_20_Font">
      <style:text-properties fo:text-transform="uppercase" fo:color="#9d2632" loext:opacity="100%" style:font-name="Kumbh Sans ExtraBold" fo:font-family="'Kumbh Sans ExtraBold'" style:font-family-generic="roman" style:font-pitch="variable" fo:font-size="14pt" fo:letter-spacing="0.005cm" fo:language="de" fo:country="DE" fo:font-weight="bold" style:letter-kerning="false" style:font-size-asian="14pt" style:font-weight-asian="bold" style:font-name-complex="Kumbh Sans ExtraBold1" style:font-family-complex="'Kumbh Sans ExtraBold'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Untertitel_20_Zchn" style:display-name="Untertitel Zchn" style:family="text" style:parent-style-name="Default_20_Paragraph_20_Font">
      <style:text-properties fo:color="#4d4f59" loext:opacity="100%" style:font-name="Kumbh Sans" fo:font-family="'Kumbh Sans'" style:font-family-generic="roman" style:font-pitch="variable" fo:font-size="14pt" fo:letter-spacing="0.005cm" fo:language="de" fo:country="DE" fo:font-weight="bold" style:letter-kerning="false" style:font-size-asian="14pt" style:font-weight-asian="bold" style:font-name-complex="Kumbh Sans1" style:font-family-complex="'Kumbh Sans'" style:font-family-generic-complex="system" style:font-pitch-complex="variable" style:font-size-complex="14pt" style:font-weight-complex="bold">
        <loext:char-complex-color loext:theme-type="dark2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9d2632" loext:opacity="100%" style:font-name="Kumbh Sans Light" fo:font-family="'Kumbh Sans Light'" style:font-family-generic="roman" style:font-pitch="variable" fo:language="de" fo:country="DE" style:font-size-complex="9pt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style:font-name="Kumbh Sans" fo:font-family="'Kumbh Sans'" style:font-family-generic="roman" style:font-pitch="variable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9d2632" loext:opacity="100%" style:font-name="Kumbh Sans" fo:font-family="'Kumbh Sans'" style:font-family-generic="roman" style:font-pitch="variable" fo:font-weight="bold" style:font-weight-asian="bold" style:font-weight-complex="bold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itat_20_Zchn" style:display-name="Zitat Zchn" style:family="text" style:parent-style-name="Default_20_Paragraph_20_Font" loext:linked-style-name="Quote">
      <style:text-properties fo:color="#4d4f59" loext:opacity="100%" style:font-name="Kumbh Sans" fo:font-family="'Kumbh Sans'" style:font-family-generic="roman" style:font-pitch="variable" fo:font-size="10pt" fo:font-style="italic" style:font-size-asian="10pt" style:font-style-asian="italic" style:font-style-complex="italic">
        <loext:char-complex-color loext:theme-type="dark2" loext:color-type="theme"/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9d2632" loext:opacity="100%" style:font-name="Kumbh Sans Light" fo:font-family="'Kumbh Sans Light'" style:font-family-generic="roman" style:font-pitch="variable" fo:font-size="9pt" fo:language="de" fo:country="DE" fo:font-style="italic" style:font-size-asian="9pt" style:font-style-asian="italic" style:font-name-complex="Times New Roman (Textkörper CS)" style:font-family-complex="'Times New Roman (Textkörper CS)'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797983" loext:opacity="100%">
        <loext:char-complex-color loext:theme-type="ligh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9d2632" loext:opacity="100%" fo:letter-spacing="0.009cm" fo:font-weight="bold" style:font-weight-asian="bold" style:font-weight-complex="bold">
        <loext:char-complex-color loext:theme-type="accent1" loext:color-type="theme"/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fo:color="#4e1318" loext:opacity="100%" style:font-name="Calibri Light" fo:font-family="'Calibri Light'" style:font-family-generic="roman" style:font-pitch="variable" fo:language="de" fo:country="D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eine_20_Liste" style:display-name="Kein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PPOE">
        <loext:color loext:name="dark1" loext:color="#000000"/>
        <loext:color loext:name="light1" loext:color="#ffffff"/>
        <loext:color loext:name="dark2" loext:color="#4d4f59"/>
        <loext:color loext:name="light2" loext:color="#797983"/>
        <loext:color loext:name="accent1" loext:color="#9d2632"/>
        <loext:color loext:name="accent2" loext:color="#904837"/>
        <loext:color loext:name="accent3" loext:color="#fbbb20"/>
        <loext:color loext:name="accent4" loext:color="#159a34"/>
        <loext:color loext:name="accent5" loext:color="#0b4697"/>
        <loext:color loext:name="accent6" loext:color="#e62336"/>
        <loext:color loext:name="hyperlink" loext:color="#9d2632"/>
        <loext:color loext:name="followed-hyperlink" loext:color="#4d4f59"/>
      </loext:theme-colors>
    </loext:theme>
  </office:styles>
  <office:automatic-styles>
    <style:style style:name="MP1" style:family="paragraph" style:parent-style-name="Header">
      <style:paragraph-properties fo:margin-top="0.141cm" fo:margin-bottom="0.141cm" style:contextual-spacing="false">
        <style:tab-stops>
          <style:tab-stop style:position="3.916cm"/>
        </style:tab-stops>
      </style:paragraph-properties>
    </style:style>
    <style:style style:name="MP2" style:family="paragraph" style:parent-style-name="Standard">
      <style:paragraph-properties fo:margin-top="0.141cm" fo:margin-bottom="0.141cm" style:contextual-spacing="false" fo:line-height="120%" fo:text-align="left" style:justify-single-word="false" fo:orphans="2" fo:widows="2" style:writing-mode="lr-tb"/>
    </style:style>
    <style:style style:name="MP3" style:family="paragraph" style:parent-style-name="Header">
      <style:paragraph-properties fo:margin-top="0.141cm" fo:margin-bottom="0.141cm" style:contextual-spacing="false"/>
    </style:style>
    <style:style style:name="MP4" style:family="paragraph" style:parent-style-name="Rahmeninhalt">
      <style:paragraph-properties fo:margin-top="0.141cm" fo:margin-bottom="0.141cm" style:contextual-spacing="false"/>
    </style:style>
    <style:style style:name="MP5" style:family="paragraph">
      <loext:graphic-properties draw:fill="none"/>
      <style:paragraph-properties fo:text-align="left"/>
      <style:text-properties fo:color="#000000" loext:opacity="100%" fo:font-size="18pt"/>
    </style:style>
    <style:style style:name="MP6" style:family="paragraph" style:parent-style-name="Footer">
      <style:paragraph-properties fo:margin-right="0.635cm" fo:text-align="right" style:justify-single-word="false">
        <style:tab-stops>
          <style:tab-stop style:position="8.001cm" style:type="center"/>
          <style:tab-stop style:position="16.753cm" style:type="right"/>
        </style:tab-stops>
      </style:paragraph-properties>
    </style:style>
    <style:style style:name="MP7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MP8" style:family="paragraph" style:parent-style-name="Fußzeile_20_2_20_-_20_PPÖ_20__2b__20_Kontakt">
      <style:text-properties officeooo:rsid="000bd871" officeooo:paragraph-rsid="000bd871"/>
    </style:style>
    <style:style style:name="MT1" style:family="text">
      <style:text-properties fo:color="#9d2632" loext:opacity="100%" fo:font-size="8pt" fo:font-weight="bold" style:font-size-asian="8pt" style:font-weight-asian="bold" style:font-size-complex="8pt" style:font-weight-complex="bold">
        <loext:char-complex-color loext:theme-type="accent1" loext:color-type="theme"/>
      </style:text-properties>
    </style:style>
    <style:style style:name="MT2" style:family="text">
      <style:text-properties style:font-name="Kumbh Sans Light" fo:font-size="8pt" style:font-size-asian="8pt" style:font-size-complex="8pt"/>
    </style:style>
    <style:style style:name="MT3" style:family="text">
      <style:text-properties fo:text-transform="uppercase" fo:color="#9d2632" loext:opacity="100%" fo:font-weight="bold" style:font-weight-asian="bold">
        <loext:char-complex-color loext:theme-type="accent1" loext:color-type="theme"/>
      </style:text-properties>
    </style:style>
    <style:style style:name="MT4" style:family="text">
      <style:text-properties officeooo:rsid="000bd871"/>
    </style:style>
    <style:style style:name="MT5" style:family="text">
      <style:text-properties fo:font-size="7pt" fo:letter-spacing="0.002cm" fo:language="de" fo:country="DE" style:letter-kerning="false" style:font-size-asian="7pt" style:font-name-complex="Kumbh Sans1" style:font-size-complex="7pt"/>
    </style:style>
    <style:style style:name="MT6" style:family="text">
      <style:text-properties fo:font-size="7pt" fo:letter-spacing="0.002cm" fo:language="de" fo:country="DE" officeooo:rsid="000bd871" style:letter-kerning="false" style:font-size-asian="7pt" style:font-name-complex="Kumbh Sans1" style:font-size-complex="7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loext:vertical-rel="page-content-top" style:horizontal-pos="from-left" style:horizontal-rel="page-start-margin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righ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.018cm" draw:fill="none" loext:fill-use-slide-background="false" draw:textarea-vertical-align="bottom" draw:auto-grow-height="false" fo:min-height="1.988cm" fo:min-width="10.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187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44cm" fo:margin-left="0cm" fo:margin-right="0cm" fo:margin-bottom="3.339cm" style:dynamic-spacing="true"/>
      </style:header-style>
      <style:footer-style>
        <style:header-footer-properties fo:min-height="1.813cm" fo:margin-left="0cm" fo:margin-right="0cm" fo:margin-top="1.71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 541740458" text:anchor-type="char" svg:x="0cm" svg:y="0cm" svg:width="21.001cm" svg:height="29.72cm"><draw:image xlink:href="Pictures/10002B00000051F2000073E0476F31E5.emf" xlink:type="simple" xlink:show="embed" xlink:actuate="onLoad" draw:mime-type="image/x-emf"/><draw:image xlink:href="Pictures/10000001000002530000034969E31891.png" xlink:type="simple" xlink:show="embed" xlink:actuate="onLoad" draw:mime-type="image/png"/></draw:frame></text:p>
      </style:header>
      <style:header-first>
        <text:p text:style-name="MP2"><draw:custom-shape text:anchor-type="char" draw:z-index="3" draw:name="Textfeld 4" draw:style-name="Mgr1" draw:text-style-name="MP5" svg:width="10.009cm" svg:height="1.987cm" svg:x="-1.951cm" svg:y="52.146cm"><text:p text:style-name="MP3">Die Pfadfinder und Pfadfinderinnen Österreichs </text:p><text:p text:style-name="Header">sind Teil der Welt-Pfadfinder*innenverbände.</text:p><text:p text:style-name="MP4">Erste Bank, IBAN: AT352011100000075582. ZVR Nummer: 517004505</text:p><draw:enhanced-geometry draw:mirror-vertical="false" svg:viewBox="0 0 0 0" draw:mirror-horizontal="false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feld 4" draw:style-name="Mgr1" draw:text-style-name="MP5" svg:width="10.009cm" svg:height="1.987cm" svg:x="19.978cm" svg:y="52.146cm"><text:p text:style-name="MP3">PFADFINDER UND PFADFINDERINNEN ÖSTERREICHS </text:p><text:p text:style-name="Header">A-1170 Wien, Stöberplatz 12/3</text:p><text:p text:style-name="Header">Telefon +43 1 5233195, info@pfadis-österreich.at</text:p><text:p text:style-name="MP3">www.pfadis-österreich.at</text:p><draw:enhanced-geometry draw:mirror-vertical="false" svg:viewBox="0 0 0 0" draw:mirror-horizontal="false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Bild1" text:anchor-type="char" svg:x="-0.09cm" svg:y="0.002cm" svg:width="10.409cm" svg:height="3.048cm" draw:z-index="0"><draw:image xlink:href="Pictures/100000010000099B000002D0E3AD8DEE.png" xlink:type="simple" xlink:show="embed" xlink:actuate="onLoad" draw:mime-type="image/png"/></draw:frame></text:p>
        <text:p text:style-name="Standard"/>
        <text:p text:style-name="MP2"/>
      </style:header-first>
      <style:footer>
        <text:p text:style-name="MP6" loext:marker-style-name="MT1"><text:span text:style-name="MT1">www.graz12.at</text:span><draw:custom-shape text:anchor-type="char" draw:z-index="2" draw:name="Rahmen2" draw:style-name="Mgr2" draw:text-style-name="MP7" svg:width="0.161cm" svg:height="0.322cm" svg:x="16.838cm" svg:y="0.002cm"><text:p text:style-name="Footer" loext:marker-style-name="MT2"><text:span text:style-name="Page_20_Number"><text:span text:style-name="MT2"><text:page-number text:select-page="current">0</text:page-number></text:span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Rahmen3" text:anchor-type="char" svg:y="0cm" svg:width="0.164cm"><draw:text-box fo:min-height="0cm"><text:p text:style-name="Footer" loext:marker-style-name="MT2"><text:span text:style-name="Page_20_Number"><text:span text:style-name="MT2"><text:page-number text:select-page="current">0</text:page-number></text:span></text:span></text:p></draw:text-box></draw:frame><draw:frame draw:style-name="Mfr3" draw:name="Rahmen31" text:anchor-type="char" svg:y="0cm" svg:width="0.164cm"><draw:text-box fo:min-height="0.041cm"><text:p text:style-name="Footer" loext:marker-style-name="MT2"><text:span text:style-name="Page_20_Number"><text:span text:style-name="MT2"><text:page-number text:select-page="current">0</text:page-number></text:span></text:span></text:p></draw:text-box></draw:frame><draw:frame draw:style-name="Mfr3" draw:name="Rahmen311" text:anchor-type="char" svg:y="0.002cm" svg:width="0.164cm"><draw:text-box fo:min-height="0.041cm"><text:p text:style-name="Footer" loext:marker-style-name="MT2"><text:span text:style-name="Page_20_Number"><text:span text:style-name="MT2"><text:page-number text:select-page="current">0</text:page-number></text:span></text:span></text:p></draw:text-box></draw:frame><text:span text:style-name="MT1"/></text:p>
      </style:footer>
      <style:footer-first>
        <text:p text:style-name="MP8" loext:marker-style-name="MT3"><text:span text:style-name="MT3">${org.name}</text:span></text:p>
        <text:p text:style-name="Fußzeile_20_2_20_-_20_PPÖ_20__2b__20_Kontakt"><text:span text:style-name="MT4">${org.address_postal_code}</text:span> <text:span text:style-name="MT4">${org.address_city}</text:span>, <text:span text:style-name="MT4">${org.address_street}</text:span>, info@graz<text:span text:style-name="MT4">XX</text:span>.at, www.graz<text:span text:style-name="MT4">XX</text:span>.at<draw:custom-shape text:anchor-type="char" draw:z-index="4" draw:name="Rahmen5" draw:style-name="Mgr2" draw:text-style-name="MP7" svg:width="0.161cm" svg:height="0.322cm" svg:x="16.838cm" svg:y="0.33cm"><text:p text:style-name="Footer" loext:marker-style-name="MT2"><text:span text:style-name="Page_20_Number"><text:span text:style-name="MT2"><text:page-number text:select-page="current">1</text:page-number></text:span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Footer"><text:span text:style-name="MT5">Raifeisenbank, </text:span><text:bookmark-start text:name="__DdeLink__95_116184512"/><text:span text:style-name="MT5">I</text:span><text:bookmark-start text:name="__DdeLink__226_1894413"/><text:span text:style-name="MT5">BAN: </text:span><text:bookmark-end text:name="__DdeLink__95_116184512"/><text:bookmark-end text:name="__DdeLink__226_1894413"/><text:span text:style-name="MT6">${org.iban}</text:span><text:span text:style-name="MT5">. ZVR Nummer: </text:span><text:span text:style-name="MT6">xxxxxx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4:05:47.690949055</meta:creation-date>
    <dc:language>de-DE</dc:language>
    <meta:print-date>2023-10-12T11:54:00</meta:print-date>
    <dc:date>2026-05-07T22:28:22.648695951</dc:date>
    <meta:editing-cycles>11</meta:editing-cycles>
    <meta:editing-duration>PT40M32S</meta:editing-duration>
    <meta:generator>LibreOffice/26.2.2.2$Linux_X86_64 LibreOffice_project/620$Build-2</meta:generator>
    <meta:document-statistic meta:table-count="0" meta:image-count="3" meta:object-count="0" meta:page-count="1" meta:paragraph-count="25" meta:word-count="91" meta:character-count="946" meta:non-whitespace-character-count="856"/>
    <meta:user-defined meta:name="AppVersion">15.0000</meta:user-defined>
    <meta:template xlink:type="simple" xlink:actuate="onRequest" xlink:title="Allgemeine Dokumentvorlage.dotx" xlink:href=""/>
  </office:meta>
</office:document-meta>
</file>